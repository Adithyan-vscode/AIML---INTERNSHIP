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4pt" style:font-size-asian="14pt" style:font-size-complex="1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 text:c="45"/><text:span text:style-name="T1">Introduction to Machine Learning</text:span><text:line-break/> <text:s text:c="5"/></text:p>
      <text:p text:style-name="Standard"/>
      <text:p text:style-name="Standard"/>
      <text:p text:style-name="Standard">. Machine Learning (ML) is a subset of Artificial Intelligence (AI) that enables computers to learn <text:s text:c="2"/>patterns from data and make decisions without being explicitly programmed.</text:p>
      <text:p text:style-name="Standard"><text:s text:c="56"/></text:p>
      <text:p text:style-name="Standard"><text:span text:style-name="T2"/></text:p>
      <text:p text:style-name="Standard"><text:span text:style-name="T2"><text:s text:c="48"/>Key Features:</text:span><text:line-break/> Learns from data<text:line-break/> Improves with experience<text:line-break/> Used in prediction &amp; decision-making</text:p>
      <text:p text:style-name="Standard"/>
      <text:p text:style-name="Standard"><text:line-break/> <text:s text:c="42"/><text:span text:style-name="T1"><text:s/>Types of Machine Learning</text:span><text:line-break/> <text:s text:c="51"/></text:p>
      <text:p text:style-name="Standard"><text:span text:style-name="T3"><text:s text:c="48"/>Supervised Learning</text:span><text:line-break/></text:p>
      <text:p text:style-name="Standard"/>
      <text:p text:style-name="Standard"><text:s/>Model learns using labeled data<text:line-break/> <text:s/></text:p>
      <text:p text:style-name="Standard">Input → Output is known<text:line-break/> </text:p>
      <text:p text:style-name="Standard"><text:s text:c="12"/>Examples:<text:line-break/>Classification (Spam detection)<text:line-break/>Regression (House price prediction)<text:line-break/>Algorithms:<text:line-break/>Linear Regression<text:line-break/>Logistic Regression<text:line-break/>Decision Tree</text:p>
      <text:p text:style-name="Standard"><text:s text:c="58"/><text:span text:style-name="T3">Unsupervised Learning</text:span><text:line-break/></text:p>
      <text:p text:style-name="Standard"><text:s text:c="6"/>Model works with unlabeled data<text:line-break/> <text:s text:c="5"/>Finds hidden patterns<text:line-break/> <text:s text:c="16"/></text:p>
      <text:p text:style-name="Standard"><text:s text:c="17"/>Examples:<text:line-break/> <text:s text:c="3"/>Customer segmentation<text:line-break/> <text:s text:c="3"/>Market basket analysis<text:line-break/> <text:s text:c="3"/>Algorithms:<text:line-break/> <text:s text:c="3"/>K-Means Clustering<text:line-break/> <text:s text:c="57"/><text:span text:style-name="T3"><text:s/>Hierarchical Clustering</text:span></text:p>
      <text:p text:style-name="Standard"><text:span text:style-name="T3"/></text:p>
      <text:p text:style-name="Standard"><text:line-break/> <text:s/>Reinforcement Learning<text:line-break/> Learning through trial and error<text:line-break/> Uses rewards and penalties<text:line-break/><text:soft-page-break/> <text:s text:c="73"/>Examples:<text:line-break/> <text:s text:c="2"/>Game playing (Chess, AI agents)<text:line-break/> <text:s text:c="3"/>Robotics</text:p>
      <text:p text:style-name="Standard"/>
      <text:p text:style-name="Standard"><text:line-break/> <text:s text:c="57"/><text:span text:style-name="T3"><text:s/>Logistic Regression</text:span></text:p>
      <text:p text:style-name="Standard"><text:line-break/> <text:s text:c="3"/>Logistic Regression is a supervised learning algorithm used for classification problems.</text:p>
      <text:p text:style-name="Standard"><text:line-break/> <text:s text:c="3"/>It predicts the probability of a class using the sigmoid function<text:line-break/><text:line-break/> <text:s text:c="3"/>Value between 0 and 1<text:line-break/> <text:s text:c="3"/>Used for binary classification (0 or 1)</text:p>
      <text:p text:style-name="Standard"><text:line-break/> <text:s text:c="51"/><text:span text:style-name="T3">Types of Logistic Regression:</text:span><text:line-break/></text:p>
      <text:p text:style-name="Standard"/>
      <text:p text:style-name="Standard"><text:s text:c="2"/>Binary (Yes/No)<text:line-break/> <text:s/>Multinomial (More than 2 classes)<text:line-break/> <text:s/>Ordinal (Ordered classes)<text:line-break/> <text:s text:c="75"/>Advantages:</text:p>
      <text:p text:style-name="Standard"/>
      <text:p text:style-name="Standard"><text:line-break/> <text:s/>Simple and efficient<text:line-break/> <text:s/>Works well for linearly separable data<text:line-break/> <text:s text:c="2"/>Probabilistic output<text:line-break/> <text:s text:c="71"/></text:p>
      <text:p text:style-name="Standard"/>
      <text:p text:style-name="Standard"><text:s text:c="72"/>Disadvantages:<text:line-break/> </text:p>
      <text:p text:style-name="Standard"><text:s/>Cannot handle complex relationships well<text:line-break/> Sensitive to outliers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6-04-27T14:54:37.03</meta:creation-date>
    <meta:document-statistic meta:table-count="0" meta:image-count="0" meta:object-count="0" meta:page-count="2" meta:paragraph-count="21" meta:word-count="184" meta:character-count="2325"/>
    <dc:date>2026-04-27T15:10:00.95</dc:date>
    <meta:editing-duration>PT9S</meta:editing-duration>
    <meta:editing-cycles>1</meta:editing-cycles>
    <meta:generator>OpenOffice/4.1.15$Win32 OpenOffice.org_project/4115m2$Build-9813</meta:generator>
  </office:meta>
</office:document-meta>
</file>