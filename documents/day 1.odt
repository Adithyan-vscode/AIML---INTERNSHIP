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61"/><text:span text:style-name="T1"><text:s/>Numpy</text:span></text:p>
      <text:p text:style-name="Standard"><text:span text:style-name="T1"/></text:p>
      <text:p text:style-name="Standard"><text:span text:style-name="T3">.Numpy is a python package</text:span></text:p>
      <text:p text:style-name="P1">. <text:span text:style-name="T3">It stands for numerical python</text:span></text:p>
      <text:p text:style-name="P1">.<text:span text:style-name="T3"> Numpy is a main tool used in data analysis,machine learning,scienticfic computing</text:span></text:p>
      <text:p text:style-name="P1">. <text:span text:style-name="T3">Import numpy library</text:span></text:p>
      <text:p text:style-name="P1"><text:span text:style-name="T3"><text:s text:c="12"/>import numpy as np</text:span></text:p>
      <text:p text:style-name="P1"><text:span text:style-name="T3">. The numpy store value in consecutive memory location hence it is fast than python list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s text:c="65"/></text:span>pandas</text:p>
      <text:p text:style-name="P1">. <text:span text:style-name="T3">Pandas is a python package</text:span></text:p>
      <text:p text:style-name="P1">. <text:span text:style-name="T3">It stands for tabular python</text:span></text:p>
      <text:p text:style-name="P1"><text:span text:style-name="T3"><text:s/></text:span>.<text:span text:style-name="T3">Pandas is a main tool used in data analysis,machine learning,scienticfic computing</text:span></text:p>
      <text:p text:style-name="P1">. <text:span text:style-name="T3">Import pandas library</text:span></text:p>
      <text:p text:style-name="P1"><text:span text:style-name="T3"><text:s text:c="12"/>import pandas as pd</text:span></text:p>
      <text:p text:style-name="P1"><text:span text:style-name="T3">. To fill empty spaces np.nan is used</text:span></text:p>
      <text:p text:style-name="P1"><text:span text:style-name="T3"/></text:p>
      <text:p text:style-name="P1"><text:span text:style-name="T3"/></text:p>
      <text:p text:style-name="P1"><text:span text:style-name="T3"><text:s text:c="69"/></text:span>matplotlib</text:p>
      <text:p text:style-name="P1"><text:span text:style-name="T3"/></text:p>
      <text:p text:style-name="P1"><text:span text:style-name="T3"><text:s text:c="54"/></text:span></text:p>
      <text:p text:style-name="P1">. <text:span text:style-name="T3">Matplotlib is a python package</text:span></text:p>
      <text:p text:style-name="P1">. <text:span text:style-name="T3">It stands for graphical python</text:span></text:p>
      <text:p text:style-name="P1">.<text:span text:style-name="T3"> <text:s/>Matplotlib is a main tool used in data analysis,machine learning,scienticfic computing</text:span></text:p>
      <text:p text:style-name="P1">. <text:span text:style-name="T3">Import Matplotlib library</text:span></text:p>
      <text:p text:style-name="P1"><text:span text:style-name="T3"><text:s text:c="12"/>import matplotlib.pyplot as plt</text:span></text:p>
      <text:p text:style-name="P1">.<text:span text:style-name="T3">The properties of the graph can be determined by the specialised codes</text:span></text:p>
      <text:p text:style-name="P1"><text:span text:style-name="T3"/></text:p>
      <text:p text:style-name="P1"/>
      <text:p text:style-name="P1"><text:span text:style-name="T3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2T22:01:59.63</meta:creation-date>
    <meta:document-statistic meta:table-count="0" meta:image-count="0" meta:object-count="0" meta:page-count="1" meta:paragraph-count="22" meta:word-count="133" meta:character-count="1079"/>
    <dc:date>2026-04-22T22:34:01.42</dc:date>
    <meta:editing-duration>PT13M34S</meta:editing-duration>
    <meta:editing-cycles>1</meta:editing-cycles>
    <meta:generator>OpenOffice/4.1.15$Win32 OpenOffice.org_project/4115m2$Build-9813</meta:generator>
  </office:meta>
</office:document-meta>
</file>